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ba95" officeooo:paragraph-rsid="000eba95"/>
    </style:style>
    <style:style style:name="P2" style:family="paragraph" style:parent-style-name="Table_20_Contents">
      <style:text-properties officeooo:rsid="000eba95" officeooo:paragraph-rsid="000eba95"/>
    </style:style>
    <style:style style:name="P3" style:family="paragraph" style:parent-style-name="Table_20_Contents">
      <style:text-properties officeooo:paragraph-rsid="000eba95"/>
    </style:style>
    <style:style style:name="T1" style:family="text">
      <style:text-properties officeooo:rsid="000eba95"/>
    </style:style>
    <style:style style:name="T2" style:family="text">
      <style:text-properties officeooo:rsid="000ee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nebene: </text:p>
      <text:p text:style-name="P1">- EFCore- DbContext</text:p>
      <text:p text:style-name="P1"/>
      <text:p text:style-name="P1">Logik:</text:p>
      <text:p text:style-name="P1">- CoreRaceRepository</text:p>
      <text:p text:style-name="P1"/>
      <text:p text:style-name="P1">Updater:</text:p>
      <text:p text:style-name="P1">- Auch das CoreRaceRepository? Wäre wahrscheinlich sinnig weil da alle Änderungen ankommen.</text:p>
      <text:p text:style-name="P1"><text:s text:c="2"/>→ CoreRaceRepository hat IUpdateSender</text:p>
      <text:p text:style-name="P1"><text:s text:c="5"/>- Auf Server ist das ein SignalRUpdateSender</text:p>
      <text:p text:style-name="P1"><text:s text:c="5"/>- Auf Client ist das ein LocalUpdateSender</text:p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">Server:</text:p>
          </table:table-cell>
          <table:table-cell table:style-name="Tabelle1.B1" office:value-type="string">
            <text:p text:style-name="P2">Client:</text:p>
          </table:table-cell>
        </table:table-row>
        <table:table-row>
          <table:table-cell table:style-name="Tabelle1.A2" office:value-type="string">
            <text:p text:style-name="Table_20_Contents"><text:s text:c="2"/><text:span text:style-name="T1">Connection:</text:span></text:p>
          </table:table-cell>
          <table:table-cell table:style-name="Tabelle1.B2" office:value-type="string">
            <text:p text:style-name="P3"><text:s text:c="2"/><text:span text:style-name="T1">Connection:</text:span></text:p>
          </table:table-cell>
        </table:table-row>
        <table:table-row>
          <table:table-cell table:style-name="Tabelle1.A2" office:value-type="string">
            <text:p text:style-name="Table_20_Contents"><text:s text:c="2"/>- <text:span text:style-name="T1">API-Server/Client</text:span></text:p>
          </table:table-cell>
          <table:table-cell table:style-name="Tabelle1.B2" office:value-type="string">
            <text:p text:style-name="Table_20_Contents"><text:s text:c="2"/>- <text:span text:style-name="T1">Direkt</text:span></text:p>
          </table:table-cell>
        </table:table-row>
      </table:table>
      <text:p text:style-name="P1"/>
      <text:p text:style-name="P1">Update-Recipient:</text:p>
      <text:p text:style-name="P1">- Objekt hat IUpdate<text:span text:style-name="T2">Notifier</text:span></text:p>
      <text:p text:style-name="P1"><text:s text:c="2"/>- Entweder LocalUpdateRecipient (WeakReferences, siehe aktuell TimingService) </text:p>
      <text:p text:style-name="P1"><text:s text:c="2"/>- Oder SignalRUpdateRecipient</text:p>
      <text:p text:style-name="P1"><text:s text:c="2"/>- Registriert sich als WeakReference-Endpunkt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in Jütte</meta:initial-creator>
    <meta:creation-date>2026-06-05T23:18:52.315021900</meta:creation-date>
    <dc:date>2026-06-05T23:28:50.613357100</dc:date>
    <dc:creator>Robin Jütte</dc:creator>
    <meta:editing-duration>PT9M57S</meta:editing-duration>
    <meta:editing-cycles>3</meta:editing-cycles>
    <meta:generator>LibreOffice/25.2.7.1$Windows_X86_64 LibreOffice_project/16e8e36d1610f10597ed778c3dcb0a5aa0ed5d6f</meta:generator>
    <meta:document-statistic meta:table-count="1" meta:image-count="0" meta:object-count="0" meta:page-count="1" meta:paragraph-count="20" meta:word-count="66" meta:character-count="566" meta:non-whitespace-character-count="492"/>
  </office:meta>
</office:document-meta>
</file>